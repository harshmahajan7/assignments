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FedEx API Calls<text:line-break/></text:p>
      <text:p text:style-name="P1">(1) https://apis-sandbox.fedex.com/oauth/token</text:p>
      <text:p text:style-name="Standard">Body</text:p>
      <text:p text:style-name="Standard">grant_type</text:p>
      <text:p text:style-name="Standard">client_id</text:p>
      <text:p text:style-name="Standard">client_secret</text:p>
      <text:p text:style-name="Standard"/>
      <text:p text:style-name="Standard">Response</text:p>
      <text:p text:style-name="Standard">{</text:p>
      <text:p text:style-name="Standard"><text:s text:c="3"/>"access_token": "eyJhbGckhce7hxsqPRVvNlR5G1mV3sfPYEYmRMig7klJ31AL5GzL26nX0wVjwkGjKeHZK_7L0kq5AEe4ogen2mVxV15WGOpCTaM85MNN03bp8HYl77XTSd7fYsNW302lx5bByUi-y9IaAjw9VKWRUaY6DpXzuoPs-5N0moPs7EEQqEbVZ2f-Ffi-QPvk8YTol-AIUu2ohmjK5qsMAx1fVoFV5aBuA5t5HiP-jhyy5Y",</text:p>
      <text:p text:style-name="Standard"><text:s text:c="3"/>"token_type": "bearer",</text:p>
      <text:p text:style-name="Standard"><text:s text:c="3"/>"expires_in": 3599,</text:p>
      <text:p text:style-name="Standard"><text:s text:c="3"/>"scope": "CXS-TP"</text:p>
      <text:p text:style-name="Standard">}</text:p>
      <text:p text:style-name="Standard"/>
      <text:p text:style-name="Standard"/>
      <text:p text:style-name="Standard"/>
      <text:p text:style-name="Standard">(2) https://apis-sandbox.fedex.com/rate/v1/rates/quotes</text:p>
      <text:p text:style-name="Standard">Body</text:p>
      <text:p text:style-name="Standard">{</text:p>
      <text:p text:style-name="Standard"><text:s/>"accountNumber": {</text:p>
      <text:p text:style-name="Standard"><text:s text:c="3"/>"value": "XXXXX7354"</text:p>
      <text:p text:style-name="Standard"><text:s/>},</text:p>
      <text:p text:style-name="Standard"><text:s/>"requestedShipment": {</text:p>
      <text:p text:style-name="Standard"><text:s text:c="3"/>"shipper": {</text:p>
      <text:p text:style-name="Standard"><text:s text:c="5"/>"address": {</text:p>
      <text:p text:style-name="Standard"><text:s text:c="7"/>"postalCode": "65247",</text:p>
      <text:p text:style-name="Standard"><text:s text:c="7"/>"countryCode": "US"</text:p>
      <text:p text:style-name="Standard"><text:s text:c="5"/>}</text:p>
      <text:p text:style-name="Standard"><text:s text:c="3"/>},</text:p>
      <text:p text:style-name="Standard"><text:s text:c="3"/>"recipient": {</text:p>
      <text:p text:style-name="Standard"><text:s text:c="5"/>"address": {</text:p>
      <text:p text:style-name="Standard"><text:s text:c="7"/>"postalCode": "72348",</text:p>
      <text:p text:style-name="Standard"><text:s text:c="7"/>"countryCode": "US"</text:p>
      <text:p text:style-name="Standard"><text:s text:c="5"/>}</text:p>
      <text:p text:style-name="Standard"><text:s text:c="3"/>},</text:p>
      <text:p text:style-name="Standard"><text:s text:c="3"/>"pickupType": "DROPOFF_AT_FEDEX_LOCATION",</text:p>
      <text:p text:style-name="Standard"><text:s text:c="3"/>"rateRequestType": [</text:p>
      <text:p text:style-name="Standard"><text:s text:c="5"/>"ACCOUNT",</text:p>
      <text:p text:style-name="Standard"><text:s text:c="5"/>"LIST"</text:p>
      <text:p text:style-name="Standard"><text:s text:c="3"/>],</text:p>
      <text:p text:style-name="Standard"><text:s text:c="3"/>"requestedPackageLineItems": [</text:p>
      <text:p text:style-name="Standard"><text:s text:c="5"/>{</text:p>
      <text:p text:style-name="Standard"><text:s text:c="7"/>"weight": {</text:p>
      <text:p text:style-name="Standard"><text:s text:c="9"/>"units": "LB",</text:p>
      <text:p text:style-name="Standard"><text:s text:c="9"/>"value": "10"</text:p>
      <text:p text:style-name="Standard"><text:soft-page-break/><text:s text:c="7"/>}</text:p>
      <text:p text:style-name="Standard"><text:s text:c="5"/>}</text:p>
      <text:p text:style-name="Standard"><text:s text:c="3"/>]</text:p>
      <text:p text:style-name="Standard"><text:s/>}</text:p>
      <text:p text:style-name="Standard">}</text:p>
      <text:p text:style-name="Standard"/>
      <text:p text:style-name="Standard">Response</text:p>
      <text:p text:style-name="Standard">{</text:p>
      <text:p text:style-name="Standard"><text:s text:c="3"/>"transactionId": "APIF_SV_RATC_TxID206ab89d-6825-40b2-844f-dd81d1b41129",</text:p>
      <text:p text:style-name="Standard"><text:s text:c="3"/>"customerTransactionId": "customer test",</text:p>
      <text:p text:style-name="Standard"><text:s text:c="3"/>"output": {</text:p>
      <text:p text:style-name="Standard"><text:s text:c="7"/>"alerts": [</text:p>
      <text:p text:style-name="Standard"><text:s text:c="11"/>{</text:p>
      <text:p text:style-name="Standard"><text:s text:c="15"/>"code": "VIRTUAL.RESPONSE",</text:p>
      <text:p text:style-name="Standard"><text:s text:c="15"/>"message": "This is a Virtual Response.",</text:p>
      <text:p text:style-name="Standard"><text:s text:c="15"/>"alertType": "NOTE"</text:p>
      <text:p text:style-name="Standard"><text:s text:c="11"/>},</text:p>
      <text:p text:style-name="Standard"><text:s text:c="11"/>{</text:p>
      <text:p text:style-name="Standard"><text:s text:c="15"/>"code": "ORIGIN.STATEORPROVINCECODE.CHANGED",</text:p>
      <text:p text:style-name="Standard"><text:s text:c="15"/>"message": "The origin state/province code has been changed.",</text:p>
      <text:p text:style-name="Standard"><text:s text:c="15"/>"alertType": "NOTE"</text:p>
      <text:p text:style-name="Standard"><text:s text:c="11"/>},</text:p>
      <text:p text:style-name="Standard"><text:s text:c="11"/>{</text:p>
      <text:p text:style-name="Standard"><text:s text:c="15"/>"code": "DESTINATION.STATEORPROVINCECODE.CHANGED",</text:p>
      <text:p text:style-name="Standard"><text:s text:c="15"/>"message": "The destination state/province code has been changed.",</text:p>
      <text:p text:style-name="Standard"><text:s text:c="15"/>"alertType": "NOTE"</text:p>
      <text:p text:style-name="Standard"><text:s text:c="11"/>}</text:p>
      <text:p text:style-name="Standard"><text:s text:c="7"/>],</text:p>
      <text:p text:style-name="Standard"><text:s text:c="7"/>"rateReplyDetails": [</text:p>
      <text:p text:style-name="Standard"><text:s text:c="11"/>{</text:p>
      <text:p text:style-name="Standard"><text:s text:c="15"/>"serviceType": "FIRST_OVERNIGHT",</text:p>
      <text:p text:style-name="Standard"><text:s text:c="15"/>"serviceName": "FedEx First Overnight®",</text:p>
      <text:p text:style-name="Standard"><text:s text:c="15"/>"packagingType": "YOUR_PACKAGING",</text:p>
      <text:p text:style-name="Standard"><text:s text:c="15"/>"ratedShipmentDetails": [</text:p>
      <text:p text:style-name="Standard"><text:s text:c="19"/>{</text:p>
      <text:p text:style-name="Standard"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114.39,</text:p>
      <text:p text:style-name="Standard"><text:s text:c="23"/>"totalNetCharge": 131.55,</text:p>
      <text:p text:style-name="Standard"><text:s text:c="23"/>"totalNetFedExCharge": 131.55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17.16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17.16</text:p>
      <text:p text:style-name="Standard"><text:soft-page-break/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4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114.39,</text:p>
      <text:p text:style-name="Standard"><text:s text:c="35"/>"netFreight": 114.39,</text:p>
      <text:p text:style-name="Standard"><text:s text:c="35"/>"totalSurcharges": 17.16,</text:p>
      <text:p text:style-name="Standard"><text:s text:c="35"/>"netFedExCharge": 131.55,</text:p>
      <text:p text:style-name="Standard"><text:s text:c="35"/>"totalTaxes": 0.0,</text:p>
      <text:p text:style-name="Standard"><text:s text:c="35"/>"netCharge": 131.55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17.16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114.39,</text:p>
      <text:p text:style-name="Standard"><text:s text:c="23"/>"totalNetCharge": 131.55,</text:p>
      <text:p text:style-name="Standard"><text:s text:c="23"/>"totalNetFedExCharge": 131.55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oft-page-break/><text:s text:c="27"/>"fuelSurchargePercent": 15.0,</text:p>
      <text:p text:style-name="Standard"><text:s text:c="27"/>"totalSurcharges": 17.16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17.16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4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114.39,</text:p>
      <text:p text:style-name="Standard"><text:s text:c="35"/>"netFreight": 114.39,</text:p>
      <text:p text:style-name="Standard"><text:s text:c="35"/>"totalSurcharges": 17.16,</text:p>
      <text:p text:style-name="Standard"><text:s text:c="35"/>"netFedExCharge": 131.55,</text:p>
      <text:p text:style-name="Standard"><text:s text:c="35"/>"totalTaxes": 0.0,</text:p>
      <text:p text:style-name="Standard"><text:s text:c="35"/>"netCharge": 131.55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17.16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oft-page-break/><text:s text:c="19"/>"ineligibleForMoneyBackGuarantee": false,</text:p>
      <text:p text:style-name="Standard"><text:s text:c="19"/>"astraDescription": "1ST OVR",</text:p>
      <text:p text:style-name="Standard"><text:s text:c="19"/>"airportId": "EWR",</text:p>
      <text:p text:style-name="Standard"><text:s text:c="19"/>"serviceCode": "06"</text:p>
      <text:p text:style-name="Standard"><text:s text:c="15"/>},</text:p>
      <text:p text:style-name="Standard"><text:s text:c="15"/>"signatureOptionType": "SERVICE_DEFAULT",</text:p>
      <text:p text:style-name="Standard"><text:s text:c="15"/>"serviceDescription": {</text:p>
      <text:p text:style-name="Standard"><text:s text:c="19"/>"serviceId": "EP1000000006",</text:p>
      <text:p text:style-name="Standard"><text:s text:c="19"/>"serviceType": "FIRST_OVERNIGHT",</text:p>
      <text:p text:style-name="Standard"><text:s text:c="19"/>"code": "06",</text:p>
      <text:p text:style-name="Standard"><text:s text:c="19"/>"names": [</text:p>
      <text:p text:style-name="Standard"><text:s text:c="23"/>{</text:p>
      <text:p text:style-name="Standard"><text:s text:c="27"/>"type": "long",</text:p>
      <text:p text:style-name="Standard"><text:s text:c="27"/>"encoding": "utf-8",</text:p>
      <text:p text:style-name="Standard"><text:s text:c="27"/>"value": "FedEx First Overnight®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First Overnight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FedEx First Overnight®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 text:c="27"/>"value": "FedEx First Overnight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utf-8",</text:p>
      <text:p text:style-name="Standard"><text:s text:c="27"/>"value": "FO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ascii",</text:p>
      <text:p text:style-name="Standard"><text:s text:c="27"/>"value": "FO"</text:p>
      <text:p text:style-name="Standard"><text:s text:c="23"/>},</text:p>
      <text:p text:style-name="Standard"><text:s text:c="23"/>{</text:p>
      <text:p text:style-name="Standard"><text:s text:c="27"/>"type": "abbrv",</text:p>
      <text:p text:style-name="Standard"><text:s text:c="27"/>"encoding": "ascii",</text:p>
      <text:p text:style-name="Standard"><text:s text:c="27"/>"value": "FO"</text:p>
      <text:p text:style-name="Standard"><text:s text:c="23"/>}</text:p>
      <text:p text:style-name="Standard"><text:s text:c="19"/>],</text:p>
      <text:p text:style-name="Standard"><text:s text:c="19"/>"serviceCategory": "parcel",</text:p>
      <text:p text:style-name="Standard"><text:s text:c="19"/>"description": "First Overnight",</text:p>
      <text:p text:style-name="Standard"><text:s text:c="19"/>"astraDescription": "1ST OVR"</text:p>
      <text:p text:style-name="Standard"><text:s text:c="15"/>}</text:p>
      <text:p text:style-name="Standard"><text:s text:c="11"/>},</text:p>
      <text:p text:style-name="Standard"><text:soft-page-break/><text:s text:c="11"/>{</text:p>
      <text:p text:style-name="Standard"><text:s text:c="15"/>"serviceType": "PRIORITY_OVERNIGHT",</text:p>
      <text:p text:style-name="Standard"><text:s text:c="15"/>"serviceName": "FedEx Priority Overnight®",</text:p>
      <text:p text:style-name="Standard"><text:s text:c="15"/>"packagingType": "YOUR_PACKAGING",</text:p>
      <text:p text:style-name="Standard"><text:s text:c="15"/>"ratedShipmentDetails": [</text:p>
      <text:p text:style-name="Standard"><text:s text:c="19"/>{</text:p>
      <text:p text:style-name="Standard"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83.39,</text:p>
      <text:p text:style-name="Standard"><text:s text:c="23"/>"totalNetCharge": 95.9,</text:p>
      <text:p text:style-name="Standard"><text:s text:c="23"/>"totalNetFedExCharge": 95.9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12.51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12.51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574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83.39,</text:p>
      <text:p text:style-name="Standard"><text:s text:c="35"/>"netFreight": 83.39,</text:p>
      <text:p text:style-name="Standard"><text:s text:c="35"/>"totalSurcharges": 12.51,</text:p>
      <text:p text:style-name="Standard"><text:s text:c="35"/>"netFedExCharge": 95.9,</text:p>
      <text:p text:style-name="Standard"><text:s text:c="35"/>"totalTaxes": 0.0,</text:p>
      <text:p text:style-name="Standard"><text:s text:c="35"/>"netCharge": 95.9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oft-page-break/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12.51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83.39,</text:p>
      <text:p text:style-name="Standard"><text:s text:c="23"/>"totalNetCharge": 95.9,</text:p>
      <text:p text:style-name="Standard"><text:s text:c="23"/>"totalNetFedExCharge": 95.9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12.51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12.51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574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83.39,</text:p>
      <text:p text:style-name="Standard"><text:s text:c="35"/>"netFreight": 83.39,</text:p>
      <text:p text:style-name="Standard"><text:s text:c="35"/>"totalSurcharges": 12.51,</text:p>
      <text:p text:style-name="Standard"><text:s text:c="35"/>"netFedExCharge": 95.9,</text:p>
      <text:p text:style-name="Standard"><text:soft-page-break/><text:s text:c="35"/>"totalTaxes": 0.0,</text:p>
      <text:p text:style-name="Standard"><text:s text:c="35"/>"netCharge": 95.9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12.51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 text:c="19"/>"ineligibleForMoneyBackGuarantee": false,</text:p>
      <text:p text:style-name="Standard"><text:s text:c="19"/>"astraDescription": "P1",</text:p>
      <text:p text:style-name="Standard"><text:s text:c="19"/>"airportId": "EWR",</text:p>
      <text:p text:style-name="Standard"><text:s text:c="19"/>"serviceCode": "01"</text:p>
      <text:p text:style-name="Standard"><text:s text:c="15"/>},</text:p>
      <text:p text:style-name="Standard"><text:s text:c="15"/>"signatureOptionType": "SERVICE_DEFAULT",</text:p>
      <text:p text:style-name="Standard"><text:s text:c="15"/>"serviceDescription": {</text:p>
      <text:p text:style-name="Standard"><text:s text:c="19"/>"serviceId": "EP1000000002",</text:p>
      <text:p text:style-name="Standard"><text:s text:c="19"/>"serviceType": "PRIORITY_OVERNIGHT",</text:p>
      <text:p text:style-name="Standard"><text:s text:c="19"/>"code": "01",</text:p>
      <text:p text:style-name="Standard"><text:s text:c="19"/>"names": [</text:p>
      <text:p text:style-name="Standard"><text:s text:c="23"/>{</text:p>
      <text:p text:style-name="Standard"><text:s text:c="27"/>"type": "long",</text:p>
      <text:p text:style-name="Standard"><text:s text:c="27"/>"encoding": "utf-8",</text:p>
      <text:p text:style-name="Standard"><text:s text:c="27"/>"value": "FedEx Priority Overnight®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Priority Overnight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FedEx Priority Overnight®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oft-page-break/><text:s text:c="27"/>"value": "FedEx Priority Overnight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utf-8",</text:p>
      <text:p text:style-name="Standard"><text:s text:c="27"/>"value": "P-1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ascii",</text:p>
      <text:p text:style-name="Standard"><text:s text:c="27"/>"value": "P-1"</text:p>
      <text:p text:style-name="Standard"><text:s text:c="23"/>},</text:p>
      <text:p text:style-name="Standard"><text:s text:c="23"/>{</text:p>
      <text:p text:style-name="Standard"><text:s text:c="27"/>"type": "abbrv",</text:p>
      <text:p text:style-name="Standard"><text:s text:c="27"/>"encoding": "ascii",</text:p>
      <text:p text:style-name="Standard"><text:s text:c="27"/>"value": "PO"</text:p>
      <text:p text:style-name="Standard"><text:s text:c="23"/>}</text:p>
      <text:p text:style-name="Standard"><text:s text:c="19"/>],</text:p>
      <text:p text:style-name="Standard"><text:s text:c="19"/>"serviceCategory": "parcel",</text:p>
      <text:p text:style-name="Standard"><text:s text:c="19"/>"description": "Priority Overnight",</text:p>
      <text:p text:style-name="Standard"><text:s text:c="19"/>"astraDescription": "P1"</text:p>
      <text:p text:style-name="Standard"><text:s text:c="15"/>}</text:p>
      <text:p text:style-name="Standard"><text:s text:c="11"/>},</text:p>
      <text:p text:style-name="Standard"><text:s text:c="11"/>{</text:p>
      <text:p text:style-name="Standard"><text:s text:c="15"/>"serviceType": "STANDARD_OVERNIGHT",</text:p>
      <text:p text:style-name="Standard"><text:s text:c="15"/>"serviceName": "FedEx Standard Overnight®",</text:p>
      <text:p text:style-name="Standard"><text:s text:c="15"/>"packagingType": "YOUR_PACKAGING",</text:p>
      <text:p text:style-name="Standard"><text:s text:c="15"/>"ratedShipmentDetails": [</text:p>
      <text:p text:style-name="Standard"><text:s text:c="19"/>{</text:p>
      <text:p text:style-name="Standard"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74.56,</text:p>
      <text:p text:style-name="Standard"><text:s text:c="23"/>"totalNetCharge": 85.74,</text:p>
      <text:p text:style-name="Standard"><text:s text:c="23"/>"totalNetFedExCharge": 85.74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11.18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11.18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oft-page-break/><text:s text:c="27"/>},</text:p>
      <text:p text:style-name="Standard"><text:s text:c="27"/>"currency": "USD",</text:p>
      <text:p text:style-name="Standard"><text:s text:c="27"/>"rateScale": "1371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74.56,</text:p>
      <text:p text:style-name="Standard"><text:s text:c="35"/>"netFreight": 74.56,</text:p>
      <text:p text:style-name="Standard"><text:s text:c="35"/>"totalSurcharges": 11.18,</text:p>
      <text:p text:style-name="Standard"><text:s text:c="35"/>"netFedExCharge": 85.74,</text:p>
      <text:p text:style-name="Standard"><text:s text:c="35"/>"totalTaxes": 0.0,</text:p>
      <text:p text:style-name="Standard"><text:s text:c="35"/>"netCharge": 85.74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11.18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74.56,</text:p>
      <text:p text:style-name="Standard"><text:s text:c="23"/>"totalNetCharge": 85.74,</text:p>
      <text:p text:style-name="Standard"><text:s text:c="23"/>"totalNetFedExCharge": 85.74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11.18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oft-page-break/><text:s text:c="35"/>"description": "Fuel Surcharge",</text:p>
      <text:p text:style-name="Standard"><text:s text:c="35"/>"amount": 11.18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371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74.56,</text:p>
      <text:p text:style-name="Standard"><text:s text:c="35"/>"netFreight": 74.56,</text:p>
      <text:p text:style-name="Standard"><text:s text:c="35"/>"totalSurcharges": 11.18,</text:p>
      <text:p text:style-name="Standard"><text:s text:c="35"/>"netFedExCharge": 85.74,</text:p>
      <text:p text:style-name="Standard"><text:s text:c="35"/>"totalTaxes": 0.0,</text:p>
      <text:p text:style-name="Standard"><text:s text:c="35"/>"netCharge": 85.74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11.18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 text:c="19"/>"ineligibleForMoneyBackGuarantee": false,</text:p>
      <text:p text:style-name="Standard"><text:s text:c="19"/>"astraDescription": "STD OVR",</text:p>
      <text:p text:style-name="Standard"><text:s text:c="19"/>"airportId": "EWR",</text:p>
      <text:p text:style-name="Standard"><text:s text:c="19"/>"serviceCode": "05"</text:p>
      <text:p text:style-name="Standard"><text:s text:c="15"/>},</text:p>
      <text:p text:style-name="Standard"><text:s text:c="15"/>"signatureOptionType": "SERVICE_DEFAULT",</text:p>
      <text:p text:style-name="Standard"><text:soft-page-break/><text:s text:c="15"/>"serviceDescription": {</text:p>
      <text:p text:style-name="Standard"><text:s text:c="19"/>"serviceId": "EP1000000005",</text:p>
      <text:p text:style-name="Standard"><text:s text:c="19"/>"serviceType": "STANDARD_OVERNIGHT",</text:p>
      <text:p text:style-name="Standard"><text:s text:c="19"/>"code": "05",</text:p>
      <text:p text:style-name="Standard"><text:s text:c="19"/>"names": [</text:p>
      <text:p text:style-name="Standard"><text:s text:c="23"/>{</text:p>
      <text:p text:style-name="Standard"><text:s text:c="27"/>"type": "long",</text:p>
      <text:p text:style-name="Standard"><text:s text:c="27"/>"encoding": "utf-8",</text:p>
      <text:p text:style-name="Standard"><text:s text:c="27"/>"value": "FedEx Standard Overnight®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Standard Overnight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FedEx Standard Overnight®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 text:c="27"/>"value": "FedEx Standard Overnight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utf-8",</text:p>
      <text:p text:style-name="Standard"><text:s text:c="27"/>"value": "SOS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ascii",</text:p>
      <text:p text:style-name="Standard"><text:s text:c="27"/>"value": "SOS"</text:p>
      <text:p text:style-name="Standard"><text:s text:c="23"/>},</text:p>
      <text:p text:style-name="Standard"><text:s text:c="23"/>{</text:p>
      <text:p text:style-name="Standard"><text:s text:c="27"/>"type": "abbrv",</text:p>
      <text:p text:style-name="Standard"><text:s text:c="27"/>"encoding": "ascii",</text:p>
      <text:p text:style-name="Standard"><text:s text:c="27"/>"value": "SO"</text:p>
      <text:p text:style-name="Standard"><text:s text:c="23"/>}</text:p>
      <text:p text:style-name="Standard"><text:s text:c="19"/>],</text:p>
      <text:p text:style-name="Standard"><text:s text:c="19"/>"serviceCategory": "parcel",</text:p>
      <text:p text:style-name="Standard"><text:s text:c="19"/>"description": "Standard Overnight",</text:p>
      <text:p text:style-name="Standard"><text:s text:c="19"/>"astraDescription": "STD OVR"</text:p>
      <text:p text:style-name="Standard"><text:s text:c="15"/>}</text:p>
      <text:p text:style-name="Standard"><text:s text:c="11"/>},</text:p>
      <text:p text:style-name="Standard"><text:s text:c="11"/>{</text:p>
      <text:p text:style-name="Standard"><text:s text:c="15"/>"serviceType": "FEDEX_2_DAY_AM",</text:p>
      <text:p text:style-name="Standard"><text:s text:c="15"/>"serviceName": "FedEx 2Day® AM",</text:p>
      <text:p text:style-name="Standard"><text:s text:c="15"/>"packagingType": "YOUR_PACKAGING",</text:p>
      <text:p text:style-name="Standard"><text:s text:c="15"/>"ratedShipmentDetails": [</text:p>
      <text:p text:style-name="Standard"><text:s text:c="19"/>{</text:p>
      <text:p text:style-name="Standard"><text:soft-page-break/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41.46,</text:p>
      <text:p text:style-name="Standard"><text:s text:c="23"/>"totalNetCharge": 47.68,</text:p>
      <text:p text:style-name="Standard"><text:s text:c="23"/>"totalNetFedExCharge": 47.68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6.22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6.22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2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41.46,</text:p>
      <text:p text:style-name="Standard"><text:s text:c="35"/>"netFreight": 41.46,</text:p>
      <text:p text:style-name="Standard"><text:s text:c="35"/>"totalSurcharges": 6.22,</text:p>
      <text:p text:style-name="Standard"><text:s text:c="35"/>"netFedExCharge": 47.68,</text:p>
      <text:p text:style-name="Standard"><text:s text:c="35"/>"totalTaxes": 0.0,</text:p>
      <text:p text:style-name="Standard"><text:s text:c="35"/>"netCharge": 47.68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6.22</text:p>
      <text:p text:style-name="Standard"><text:s text:c="39"/>}</text:p>
      <text:p text:style-name="Standard"><text:soft-page-break/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41.46,</text:p>
      <text:p text:style-name="Standard"><text:s text:c="23"/>"totalNetCharge": 47.68,</text:p>
      <text:p text:style-name="Standard"><text:s text:c="23"/>"totalNetFedExCharge": 47.68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6.22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6.22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12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41.46,</text:p>
      <text:p text:style-name="Standard"><text:s text:c="35"/>"netFreight": 41.46,</text:p>
      <text:p text:style-name="Standard"><text:s text:c="35"/>"totalSurcharges": 6.22,</text:p>
      <text:p text:style-name="Standard"><text:s text:c="35"/>"netFedExCharge": 47.68,</text:p>
      <text:p text:style-name="Standard"><text:s text:c="35"/>"totalTaxes": 0.0,</text:p>
      <text:p text:style-name="Standard"><text:s text:c="35"/>"netCharge": 47.68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oft-page-break/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6.22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 text:c="19"/>"ineligibleForMoneyBackGuarantee": false,</text:p>
      <text:p text:style-name="Standard"><text:s text:c="19"/>"astraDescription": "2DAY AM",</text:p>
      <text:p text:style-name="Standard"><text:s text:c="19"/>"airportId": "EWR",</text:p>
      <text:p text:style-name="Standard"><text:s text:c="19"/>"serviceCode": "49"</text:p>
      <text:p text:style-name="Standard"><text:s text:c="15"/>},</text:p>
      <text:p text:style-name="Standard"><text:s text:c="15"/>"signatureOptionType": "SERVICE_DEFAULT",</text:p>
      <text:p text:style-name="Standard"><text:s text:c="15"/>"serviceDescription": {</text:p>
      <text:p text:style-name="Standard"><text:s text:c="19"/>"serviceId": "EP1000000023",</text:p>
      <text:p text:style-name="Standard"><text:s text:c="19"/>"serviceType": "FEDEX_2_DAY_AM",</text:p>
      <text:p text:style-name="Standard"><text:s text:c="19"/>"code": "49",</text:p>
      <text:p text:style-name="Standard"><text:s text:c="19"/>"names": [</text:p>
      <text:p text:style-name="Standard"><text:s text:c="23"/>{</text:p>
      <text:p text:style-name="Standard"><text:s text:c="27"/>"type": "long",</text:p>
      <text:p text:style-name="Standard"><text:s text:c="27"/>"encoding": "utf-8",</text:p>
      <text:p text:style-name="Standard"><text:s text:c="27"/>"value": "FedEx 2Day® AM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2Day AM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FedEx 2Day® AM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 text:c="27"/>"value": "FedEx 2Day AM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utf-8",</text:p>
      <text:p text:style-name="Standard"><text:s text:c="27"/>"value": "E2AM"</text:p>
      <text:p text:style-name="Standard"><text:soft-page-break/><text:s text:c="23"/>},</text:p>
      <text:p text:style-name="Standard"><text:s text:c="23"/>{</text:p>
      <text:p text:style-name="Standard"><text:s text:c="27"/>"type": "short",</text:p>
      <text:p text:style-name="Standard"><text:s text:c="27"/>"encoding": "ascii",</text:p>
      <text:p text:style-name="Standard"><text:s text:c="27"/>"value": "E2AM"</text:p>
      <text:p text:style-name="Standard"><text:s text:c="23"/>},</text:p>
      <text:p text:style-name="Standard"><text:s text:c="23"/>{</text:p>
      <text:p text:style-name="Standard"><text:s text:c="27"/>"type": "abbrv",</text:p>
      <text:p text:style-name="Standard"><text:s text:c="27"/>"encoding": "ascii",</text:p>
      <text:p text:style-name="Standard"><text:s text:c="27"/>"value": "TA"</text:p>
      <text:p text:style-name="Standard"><text:s text:c="23"/>}</text:p>
      <text:p text:style-name="Standard"><text:s text:c="19"/>],</text:p>
      <text:p text:style-name="Standard"><text:s text:c="19"/>"serviceCategory": "parcel",</text:p>
      <text:p text:style-name="Standard"><text:s text:c="19"/>"description": "2DAY AM",</text:p>
      <text:p text:style-name="Standard"><text:s text:c="19"/>"astraDescription": "2DAY AM"</text:p>
      <text:p text:style-name="Standard"><text:s text:c="15"/>}</text:p>
      <text:p text:style-name="Standard"><text:s text:c="11"/>},</text:p>
      <text:p text:style-name="Standard"><text:s text:c="11"/>{</text:p>
      <text:p text:style-name="Standard"><text:s text:c="15"/>"serviceType": "FEDEX_2_DAY",</text:p>
      <text:p text:style-name="Standard"><text:s text:c="15"/>"serviceName": "FedEx 2Day®",</text:p>
      <text:p text:style-name="Standard"><text:s text:c="15"/>"packagingType": "YOUR_PACKAGING",</text:p>
      <text:p text:style-name="Standard"><text:s text:c="15"/>"ratedShipmentDetails": [</text:p>
      <text:p text:style-name="Standard"><text:s text:c="19"/>{</text:p>
      <text:p text:style-name="Standard"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34.5,</text:p>
      <text:p text:style-name="Standard"><text:s text:c="23"/>"totalNetCharge": 39.68,</text:p>
      <text:p text:style-name="Standard"><text:s text:c="23"/>"totalNetFedExCharge": 39.68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5.18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5.18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6068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oft-page-break/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34.5,</text:p>
      <text:p text:style-name="Standard"><text:s text:c="35"/>"netFreight": 34.5,</text:p>
      <text:p text:style-name="Standard"><text:s text:c="35"/>"totalSurcharges": 5.18,</text:p>
      <text:p text:style-name="Standard"><text:s text:c="35"/>"netFedExCharge": 39.68,</text:p>
      <text:p text:style-name="Standard"><text:s text:c="35"/>"totalTaxes": 0.0,</text:p>
      <text:p text:style-name="Standard"><text:s text:c="35"/>"netCharge": 39.68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5.18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34.5,</text:p>
      <text:p text:style-name="Standard"><text:s text:c="23"/>"totalNetCharge": 39.68,</text:p>
      <text:p text:style-name="Standard"><text:s text:c="23"/>"totalNetFedExCharge": 39.68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5.18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5.18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oft-page-break/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6068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34.5,</text:p>
      <text:p text:style-name="Standard"><text:s text:c="35"/>"netFreight": 34.5,</text:p>
      <text:p text:style-name="Standard"><text:s text:c="35"/>"totalSurcharges": 5.18,</text:p>
      <text:p text:style-name="Standard"><text:s text:c="35"/>"netFedExCharge": 39.68,</text:p>
      <text:p text:style-name="Standard"><text:s text:c="35"/>"totalTaxes": 0.0,</text:p>
      <text:p text:style-name="Standard"><text:s text:c="35"/>"netCharge": 39.68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5.18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 text:c="19"/>"ineligibleForMoneyBackGuarantee": false,</text:p>
      <text:p text:style-name="Standard"><text:s text:c="19"/>"astraDescription": "E2",</text:p>
      <text:p text:style-name="Standard"><text:s text:c="19"/>"airportId": "EWR",</text:p>
      <text:p text:style-name="Standard"><text:s text:c="19"/>"serviceCode": "03"</text:p>
      <text:p text:style-name="Standard"><text:s text:c="15"/>},</text:p>
      <text:p text:style-name="Standard"><text:s text:c="15"/>"signatureOptionType": "SERVICE_DEFAULT",</text:p>
      <text:p text:style-name="Standard"><text:s text:c="15"/>"serviceDescription": {</text:p>
      <text:p text:style-name="Standard"><text:s text:c="19"/>"serviceId": "EP1000000003",</text:p>
      <text:p text:style-name="Standard"><text:s text:c="19"/>"serviceType": "FEDEX_2_DAY",</text:p>
      <text:p text:style-name="Standard"><text:s text:c="19"/>"code": "03",</text:p>
      <text:p text:style-name="Standard"><text:s text:c="19"/>"names": [</text:p>
      <text:p text:style-name="Standard"><text:s text:c="23"/>{</text:p>
      <text:p text:style-name="Standard"><text:soft-page-break/><text:s text:c="27"/>"type": "long",</text:p>
      <text:p text:style-name="Standard"><text:s text:c="27"/>"encoding": "utf-8",</text:p>
      <text:p text:style-name="Standard"><text:s text:c="27"/>"value": "FedEx 2Day®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2Day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FedEx 2Day®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 text:c="27"/>"value": "FedEx 2Day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utf-8",</text:p>
      <text:p text:style-name="Standard"><text:s text:c="27"/>"value": "P-2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ascii",</text:p>
      <text:p text:style-name="Standard"><text:s text:c="27"/>"value": "P-2"</text:p>
      <text:p text:style-name="Standard"><text:s text:c="23"/>},</text:p>
      <text:p text:style-name="Standard"><text:s text:c="23"/>{</text:p>
      <text:p text:style-name="Standard"><text:s text:c="27"/>"type": "abbrv",</text:p>
      <text:p text:style-name="Standard"><text:s text:c="27"/>"encoding": "ascii",</text:p>
      <text:p text:style-name="Standard"><text:s text:c="27"/>"value": "ES"</text:p>
      <text:p text:style-name="Standard"><text:s text:c="23"/>}</text:p>
      <text:p text:style-name="Standard"><text:s text:c="19"/>],</text:p>
      <text:p text:style-name="Standard"><text:s text:c="19"/>"serviceCategory": "parcel",</text:p>
      <text:p text:style-name="Standard"><text:s text:c="19"/>"description": "2Day",</text:p>
      <text:p text:style-name="Standard"><text:s text:c="19"/>"astraDescription": "E2"</text:p>
      <text:p text:style-name="Standard"><text:s text:c="15"/>}</text:p>
      <text:p text:style-name="Standard"><text:s text:c="11"/>},</text:p>
      <text:p text:style-name="Standard"><text:s text:c="11"/>{</text:p>
      <text:p text:style-name="Standard"><text:s text:c="15"/>"serviceType": "FEDEX_EXPRESS_SAVER",</text:p>
      <text:p text:style-name="Standard"><text:s text:c="15"/>"serviceName": "FedEx Express Saver®",</text:p>
      <text:p text:style-name="Standard"><text:s text:c="15"/>"packagingType": "YOUR_PACKAGING",</text:p>
      <text:p text:style-name="Standard"><text:s text:c="15"/>"ratedShipmentDetails": [</text:p>
      <text:p text:style-name="Standard"><text:s text:c="19"/>{</text:p>
      <text:p text:style-name="Standard"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29.46,</text:p>
      <text:p text:style-name="Standard"><text:s text:c="23"/>"totalNetCharge": 33.88,</text:p>
      <text:p text:style-name="Standard"><text:s text:c="23"/>"totalNetFedExCharge": 33.88,</text:p>
      <text:p text:style-name="Standard"><text:soft-page-break/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4.42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4.42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7175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29.46,</text:p>
      <text:p text:style-name="Standard"><text:s text:c="35"/>"netFreight": 29.46,</text:p>
      <text:p text:style-name="Standard"><text:s text:c="35"/>"totalSurcharges": 4.42,</text:p>
      <text:p text:style-name="Standard"><text:s text:c="35"/>"netFedExCharge": 33.88,</text:p>
      <text:p text:style-name="Standard"><text:s text:c="35"/>"totalTaxes": 0.0,</text:p>
      <text:p text:style-name="Standard"><text:s text:c="35"/>"netCharge": 33.88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amount": 4.42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oft-page-break/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29.46,</text:p>
      <text:p text:style-name="Standard"><text:s text:c="23"/>"totalNetCharge": 33.88,</text:p>
      <text:p text:style-name="Standard"><text:s text:c="23"/>"totalNetFedExCharge": 33.88,</text:p>
      <text:p text:style-name="Standard"><text:s text:c="23"/>"shipmentRateDetail": {</text:p>
      <text:p text:style-name="Standard"><text:s text:c="27"/>"rateZone": "06",</text:p>
      <text:p text:style-name="Standard"><text:s text:c="27"/>"dimDivisor": 0,</text:p>
      <text:p text:style-name="Standard"><text:s text:c="27"/>"fuelSurchargePercent": 15.0,</text:p>
      <text:p text:style-name="Standard"><text:s text:c="27"/>"totalSurcharges": 4.42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amount": 4.42</text:p>
      <text:p text:style-name="Standard"><text:s text:c="31"/>}</text:p>
      <text:p text:style-name="Standard"><text:s text:c="27"/>],</text:p>
      <text:p text:style-name="Standard"><text:s text:c="27"/>"pricingCode": "PACKAGE"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,</text:p>
      <text:p text:style-name="Standard"><text:s text:c="27"/>"rateScale": "7175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29.46,</text:p>
      <text:p text:style-name="Standard"><text:s text:c="35"/>"netFreight": 29.46,</text:p>
      <text:p text:style-name="Standard"><text:s text:c="35"/>"totalSurcharges": 4.42,</text:p>
      <text:p text:style-name="Standard"><text:s text:c="35"/>"netFedExCharge": 33.88,</text:p>
      <text:p text:style-name="Standard"><text:s text:c="35"/>"totalTaxes": 0.0,</text:p>
      <text:p text:style-name="Standard"><text:s text:c="35"/>"netCharge": 33.88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oft-page-break/><text:s text:c="43"/>"amount": 4.42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 text:c="19"/>"ineligibleForMoneyBackGuarantee": false,</text:p>
      <text:p text:style-name="Standard"><text:s text:c="19"/>"astraDescription": "XS",</text:p>
      <text:p text:style-name="Standard"><text:s text:c="19"/>"airportId": "EWR",</text:p>
      <text:p text:style-name="Standard"><text:s text:c="19"/>"serviceCode": "20"</text:p>
      <text:p text:style-name="Standard"><text:s text:c="15"/>},</text:p>
      <text:p text:style-name="Standard"><text:s text:c="15"/>"signatureOptionType": "SERVICE_DEFAULT",</text:p>
      <text:p text:style-name="Standard"><text:s text:c="15"/>"serviceDescription": {</text:p>
      <text:p text:style-name="Standard"><text:s text:c="19"/>"serviceId": "EP1000000013",</text:p>
      <text:p text:style-name="Standard"><text:s text:c="19"/>"serviceType": "FEDEX_EXPRESS_SAVER",</text:p>
      <text:p text:style-name="Standard"><text:s text:c="19"/>"code": "20",</text:p>
      <text:p text:style-name="Standard"><text:s text:c="19"/>"names": [</text:p>
      <text:p text:style-name="Standard"><text:s text:c="23"/>{</text:p>
      <text:p text:style-name="Standard"><text:s text:c="27"/>"type": "long",</text:p>
      <text:p text:style-name="Standard"><text:s text:c="27"/>"encoding": "utf-8",</text:p>
      <text:p text:style-name="Standard"><text:s text:c="27"/>"value": "FedEx Express Saver®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Express Saver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FedEx Express Saver®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 text:c="27"/>"value": "FedEx Express Saver"</text:p>
      <text:p text:style-name="Standard"><text:s text:c="23"/>}</text:p>
      <text:p text:style-name="Standard"><text:s text:c="19"/>],</text:p>
      <text:p text:style-name="Standard"><text:s text:c="19"/>"serviceCategory": "parcel",</text:p>
      <text:p text:style-name="Standard"><text:s text:c="19"/>"description": "Express Saver",</text:p>
      <text:p text:style-name="Standard"><text:s text:c="19"/>"astraDescription": "XS"</text:p>
      <text:p text:style-name="Standard"><text:s text:c="15"/>}</text:p>
      <text:p text:style-name="Standard"><text:s text:c="11"/>},</text:p>
      <text:p text:style-name="Standard"><text:s text:c="11"/>{</text:p>
      <text:p text:style-name="Standard"><text:s text:c="15"/>"serviceType": "FEDEX_GROUND",</text:p>
      <text:p text:style-name="Standard"><text:s text:c="15"/>"serviceName": "FedEx Ground®",</text:p>
      <text:p text:style-name="Standard"><text:s text:c="15"/>"packagingType": "YOUR_PACKAGING",</text:p>
      <text:p text:style-name="Standard"><text:soft-page-break/><text:s text:c="15"/>"ratedShipmentDetails": [</text:p>
      <text:p text:style-name="Standard"><text:s text:c="19"/>{</text:p>
      <text:p text:style-name="Standard"><text:s text:c="23"/>"rateType": "ACCOUN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12.38,</text:p>
      <text:p text:style-name="Standard"><text:s text:c="23"/>"totalNetCharge": 14.14,</text:p>
      <text:p text:style-name="Standard"><text:s text:c="23"/>"totalNetFedExCharge": 14.14,</text:p>
      <text:p text:style-name="Standard"><text:s text:c="23"/>"shipmentRateDetail": {</text:p>
      <text:p text:style-name="Standard"><text:s text:c="27"/>"rateZone": "6",</text:p>
      <text:p text:style-name="Standard"><text:s text:c="27"/>"dimDivisor": 0,</text:p>
      <text:p text:style-name="Standard"><text:s text:c="27"/>"fuelSurchargePercent": 14.25,</text:p>
      <text:p text:style-name="Standard"><text:s text:c="27"/>"totalSurcharges": 1.76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level": "PACKAGE",</text:p>
      <text:p text:style-name="Standard"><text:s text:c="35"/>"amount": 1.76</text:p>
      <text:p text:style-name="Standard"><text:s text:c="31"/>}</text:p>
      <text:p text:style-name="Standard"><text:s text:c="27"/>]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ACCOUNT_PACKAGE",</text:p>
      <text:p text:style-name="Standard"><text:s text:c="35"/>"ratedWeightMethod": "ACTUAL",</text:p>
      <text:p text:style-name="Standard"><text:s text:c="35"/>"baseCharge": 12.38,</text:p>
      <text:p text:style-name="Standard"><text:s text:c="35"/>"netFreight": 12.38,</text:p>
      <text:p text:style-name="Standard"><text:s text:c="35"/>"totalSurcharges": 1.76,</text:p>
      <text:p text:style-name="Standard"><text:s text:c="35"/>"netFedExCharge": 14.14,</text:p>
      <text:p text:style-name="Standard"><text:s text:c="35"/>"totalTaxes": 0.0,</text:p>
      <text:p text:style-name="Standard"><text:s text:c="35"/>"netCharge": 14.14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level": "PACKAGE",</text:p>
      <text:p text:style-name="Standard"><text:soft-page-break/><text:s text:c="43"/>"amount": 1.76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,</text:p>
      <text:p text:style-name="Standard"><text:s text:c="19"/>{</text:p>
      <text:p text:style-name="Standard"><text:s text:c="23"/>"rateType": "LIST",</text:p>
      <text:p text:style-name="Standard"><text:s text:c="23"/>"ratedWeightMethod": "ACTUAL",</text:p>
      <text:p text:style-name="Standard"><text:s text:c="23"/>"totalDiscounts": 0.0,</text:p>
      <text:p text:style-name="Standard"><text:s text:c="23"/>"totalBaseCharge": 12.38,</text:p>
      <text:p text:style-name="Standard"><text:s text:c="23"/>"totalNetCharge": 14.14,</text:p>
      <text:p text:style-name="Standard"><text:s text:c="23"/>"totalNetFedExCharge": 14.14,</text:p>
      <text:p text:style-name="Standard"><text:s text:c="23"/>"shipmentRateDetail": {</text:p>
      <text:p text:style-name="Standard"><text:s text:c="27"/>"rateZone": "6",</text:p>
      <text:p text:style-name="Standard"><text:s text:c="27"/>"dimDivisor": 0,</text:p>
      <text:p text:style-name="Standard"><text:s text:c="27"/>"fuelSurchargePercent": 14.25,</text:p>
      <text:p text:style-name="Standard"><text:s text:c="27"/>"totalSurcharges": 1.76,</text:p>
      <text:p text:style-name="Standard"><text:s text:c="27"/>"totalFreightDiscount": 0.0,</text:p>
      <text:p text:style-name="Standard"><text:s text:c="27"/>"surCharges": [</text:p>
      <text:p text:style-name="Standard"><text:s text:c="31"/>{</text:p>
      <text:p text:style-name="Standard"><text:s text:c="35"/>"type": "FUEL",</text:p>
      <text:p text:style-name="Standard"><text:s text:c="35"/>"description": "Fuel Surcharge",</text:p>
      <text:p text:style-name="Standard"><text:s text:c="35"/>"level": "PACKAGE",</text:p>
      <text:p text:style-name="Standard"><text:s text:c="35"/>"amount": 1.76</text:p>
      <text:p text:style-name="Standard"><text:s text:c="31"/>}</text:p>
      <text:p text:style-name="Standard"><text:s text:c="27"/>],</text:p>
      <text:p text:style-name="Standard"><text:s text:c="27"/>"totalBillingWeight": {</text:p>
      <text:p text:style-name="Standard"><text:s text:c="31"/>"units": "LB",</text:p>
      <text:p text:style-name="Standard"><text:s text:c="31"/>"value": 1.0</text:p>
      <text:p text:style-name="Standard"><text:s text:c="27"/>},</text:p>
      <text:p text:style-name="Standard"><text:s text:c="27"/>"currency": "USD"</text:p>
      <text:p text:style-name="Standard"><text:s text:c="23"/>},</text:p>
      <text:p text:style-name="Standard"><text:s text:c="23"/>"ratedPackages": [</text:p>
      <text:p text:style-name="Standard"><text:s text:c="27"/>{</text:p>
      <text:p text:style-name="Standard"><text:s text:c="31"/>"groupNumber": 0,</text:p>
      <text:p text:style-name="Standard"><text:s text:c="31"/>"effectiveNetDiscount": 0.0,</text:p>
      <text:p text:style-name="Standard"><text:s text:c="31"/>"packageRateDetail": {</text:p>
      <text:p text:style-name="Standard"><text:s text:c="35"/>"rateType": "PAYOR_LIST_PACKAGE",</text:p>
      <text:p text:style-name="Standard"><text:s text:c="35"/>"ratedWeightMethod": "ACTUAL",</text:p>
      <text:p text:style-name="Standard"><text:s text:c="35"/>"baseCharge": 12.38,</text:p>
      <text:p text:style-name="Standard"><text:s text:c="35"/>"netFreight": 12.38,</text:p>
      <text:p text:style-name="Standard"><text:s text:c="35"/>"totalSurcharges": 1.76,</text:p>
      <text:p text:style-name="Standard"><text:s text:c="35"/>"netFedExCharge": 14.14,</text:p>
      <text:p text:style-name="Standard"><text:s text:c="35"/>"totalTaxes": 0.0,</text:p>
      <text:p text:style-name="Standard"><text:s text:c="35"/>"netCharge": 14.14,</text:p>
      <text:p text:style-name="Standard"><text:s text:c="35"/>"totalRebates": 0.0,</text:p>
      <text:p text:style-name="Standard"><text:s text:c="35"/>"billingWeight": {</text:p>
      <text:p text:style-name="Standard"><text:s text:c="39"/>"units": "LB",</text:p>
      <text:p text:style-name="Standard"><text:soft-page-break/><text:s text:c="39"/>"value": 1.0</text:p>
      <text:p text:style-name="Standard"><text:s text:c="35"/>},</text:p>
      <text:p text:style-name="Standard"><text:s text:c="35"/>"totalFreightDiscounts": 0.0,</text:p>
      <text:p text:style-name="Standard"><text:s text:c="35"/>"surcharges": [</text:p>
      <text:p text:style-name="Standard"><text:s text:c="39"/>{</text:p>
      <text:p text:style-name="Standard"><text:s text:c="43"/>"type": "FUEL",</text:p>
      <text:p text:style-name="Standard"><text:s text:c="43"/>"description": "Fuel Surcharge",</text:p>
      <text:p text:style-name="Standard"><text:s text:c="43"/>"level": "PACKAGE",</text:p>
      <text:p text:style-name="Standard"><text:s text:c="43"/>"amount": 1.76</text:p>
      <text:p text:style-name="Standard"><text:s text:c="39"/>}</text:p>
      <text:p text:style-name="Standard"><text:s text:c="35"/>],</text:p>
      <text:p text:style-name="Standard"><text:s text:c="35"/>"currency": "USD"</text:p>
      <text:p text:style-name="Standard"><text:s text:c="31"/>}</text:p>
      <text:p text:style-name="Standard"><text:s text:c="27"/>}</text:p>
      <text:p text:style-name="Standard"><text:s text:c="23"/>],</text:p>
      <text:p text:style-name="Standard"><text:s text:c="23"/>"currency": "USD"</text:p>
      <text:p text:style-name="Standard"><text:s text:c="19"/>}</text:p>
      <text:p text:style-name="Standard"><text:s text:c="15"/>],</text:p>
      <text:p text:style-name="Standard"><text:s text:c="15"/>"operationalDetail": {</text:p>
      <text:p text:style-name="Standard"><text:s text:c="19"/>"ineligibleForMoneyBackGuarantee": false,</text:p>
      <text:p text:style-name="Standard"><text:s text:c="19"/>"astraDescription": "FXG",</text:p>
      <text:p text:style-name="Standard"><text:s text:c="19"/>"airportId": "EWR",</text:p>
      <text:p text:style-name="Standard"><text:s text:c="19"/>"serviceCode": "92"</text:p>
      <text:p text:style-name="Standard"><text:s text:c="15"/>},</text:p>
      <text:p text:style-name="Standard"><text:s text:c="15"/>"signatureOptionType": "SERVICE_DEFAULT",</text:p>
      <text:p text:style-name="Standard"><text:s text:c="15"/>"serviceDescription": {</text:p>
      <text:p text:style-name="Standard"><text:s text:c="19"/>"serviceId": "EP1000000134",</text:p>
      <text:p text:style-name="Standard"><text:s text:c="19"/>"serviceType": "FEDEX_GROUND",</text:p>
      <text:p text:style-name="Standard"><text:s text:c="19"/>"code": "92",</text:p>
      <text:p text:style-name="Standard"><text:s text:c="19"/>"names": [</text:p>
      <text:p text:style-name="Standard"><text:s text:c="23"/>{</text:p>
      <text:p text:style-name="Standard"><text:s text:c="27"/>"type": "long",</text:p>
      <text:p text:style-name="Standard"><text:s text:c="27"/>"encoding": "utf-8",</text:p>
      <text:p text:style-name="Standard"><text:s text:c="27"/>"value": "FedEx Ground®"</text:p>
      <text:p text:style-name="Standard"><text:s text:c="23"/>},</text:p>
      <text:p text:style-name="Standard"><text:s text:c="23"/>{</text:p>
      <text:p text:style-name="Standard"><text:s text:c="27"/>"type": "long",</text:p>
      <text:p text:style-name="Standard"><text:s text:c="27"/>"encoding": "ascii",</text:p>
      <text:p text:style-name="Standard"><text:s text:c="27"/>"value": "FedEx Ground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utf-8",</text:p>
      <text:p text:style-name="Standard"><text:s text:c="27"/>"value": "Ground®"</text:p>
      <text:p text:style-name="Standard"><text:s text:c="23"/>},</text:p>
      <text:p text:style-name="Standard"><text:s text:c="23"/>{</text:p>
      <text:p text:style-name="Standard"><text:s text:c="27"/>"type": "medium",</text:p>
      <text:p text:style-name="Standard"><text:s text:c="27"/>"encoding": "ascii",</text:p>
      <text:p text:style-name="Standard"><text:s text:c="27"/>"value": "Ground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oft-page-break/><text:s text:c="27"/>"encoding": "utf-8",</text:p>
      <text:p text:style-name="Standard"><text:s text:c="27"/>"value": "FG"</text:p>
      <text:p text:style-name="Standard"><text:s text:c="23"/>},</text:p>
      <text:p text:style-name="Standard"><text:s text:c="23"/>{</text:p>
      <text:p text:style-name="Standard"><text:s text:c="27"/>"type": "short",</text:p>
      <text:p text:style-name="Standard"><text:s text:c="27"/>"encoding": "ascii",</text:p>
      <text:p text:style-name="Standard"><text:s text:c="27"/>"value": "FG"</text:p>
      <text:p text:style-name="Standard"><text:s text:c="23"/>},</text:p>
      <text:p text:style-name="Standard"><text:s text:c="23"/>{</text:p>
      <text:p text:style-name="Standard"><text:s text:c="27"/>"type": "abbrv",</text:p>
      <text:p text:style-name="Standard"><text:s text:c="27"/>"encoding": "ascii",</text:p>
      <text:p text:style-name="Standard"><text:s text:c="27"/>"value": "SG"</text:p>
      <text:p text:style-name="Standard"><text:s text:c="23"/>}</text:p>
      <text:p text:style-name="Standard"><text:s text:c="19"/>],</text:p>
      <text:p text:style-name="Standard"><text:s text:c="19"/>"description": "FedEx Ground",</text:p>
      <text:p text:style-name="Standard"><text:s text:c="19"/>"astraDescription": "FXG"</text:p>
      <text:p text:style-name="Standard"><text:s text:c="15"/>}</text:p>
      <text:p text:style-name="Standard"><text:s text:c="11"/>}</text:p>
      <text:p text:style-name="Standard"><text:s text:c="7"/>],</text:p>
      <text:p text:style-name="Standard"><text:s text:c="7"/>"quoteDate": "2023-08-02",</text:p>
      <text:p text:style-name="Standard"><text:s text:c="7"/>"encoded": false</text:p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21:34:02.278620985</meta:creation-date>
    <dc:date>2026-06-29T21:34:51.187628497</dc:date>
    <meta:editing-duration>PT50S</meta:editing-duration>
    <meta:editing-cycles>1</meta:editing-cycles>
    <meta:document-statistic meta:table-count="0" meta:image-count="0" meta:object-count="0" meta:page-count="26" meta:paragraph-count="1312" meta:word-count="2361" meta:character-count="56062" meta:non-whitespace-character-count="20291"/>
    <meta:generator>LibreOffice/24.2.7.2$Linux_X86_64 LibreOffice_project/420$Build-2</meta:generator>
  </office:meta>
</office:document-meta>
</file>